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27.301cm" table:align="margins"/>
    </style:style>
    <style:style style:name="Table1.A" style:family="table-column">
      <style:table-column-properties style:column-width="13.651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P1" style:family="paragraph" style:parent-style-name="Heading_20_2">
      <style:text-properties fo:font-size="14pt" officeooo:rsid="001e6610" officeooo:paragraph-rsid="001e6610" style:font-size-asian="14pt" style:font-size-complex="14pt"/>
    </style:style>
    <style:style style:name="P2" style:family="paragraph" style:parent-style-name="Heading_20_2">
      <style:text-properties fo:font-size="12pt" style:font-size-asian="12pt" style:font-size-complex="12pt"/>
    </style:style>
    <style:style style:name="P3" style:family="paragraph" style:parent-style-name="Heading_20_4">
      <style:text-properties fo:font-size="10pt" style:font-size-asian="10pt" style:font-size-complex="10pt"/>
    </style:style>
    <style:style style:name="P4" style:family="paragraph" style:parent-style-name="Text_20_body">
      <style:text-properties fo:font-size="10pt" style:font-size-asian="10pt" style:font-size-complex="10pt"/>
    </style:style>
    <style:style style:name="P5" style:family="paragraph" style:parent-style-name="Text_20_body" style:list-style-name="L1">
      <style:text-properties fo:font-size="10pt" style:font-size-asian="10pt" style:font-size-complex="10pt"/>
    </style:style>
    <style:style style:name="P6" style:family="paragraph" style:parent-style-name="Text_20_body" style:list-style-name="L2">
      <style:text-properties fo:font-size="10pt" style:font-size-asian="10pt" style:font-size-complex="10pt"/>
    </style:style>
    <style:style style:name="P7" style:family="paragraph" style:parent-style-name="Text_20_body" style:list-style-name="L3">
      <style:text-properties fo:font-size="10pt" style:font-size-asian="10pt" style:font-size-complex="10pt"/>
    </style:style>
    <style:style style:name="P8" style:family="paragraph" style:parent-style-name="Text_20_body" style:list-style-name="L4">
      <style:text-properties fo:font-size="10pt" style:font-size-asian="10pt" style:font-size-complex="10pt"/>
    </style:style>
    <style:style style:name="P9" style:family="paragraph" style:parent-style-name="Text_20_body" style:list-style-name="L5">
      <style:text-properties fo:font-size="10pt" style:font-size-asian="10pt" style:font-size-complex="10pt"/>
    </style:style>
    <style:style style:name="P10" style:family="paragraph" style:parent-style-name="Heading_20_2">
      <style:text-properties fo:font-size="12pt" officeooo:paragraph-rsid="001e6610" style:font-size-asian="12pt" style:font-size-complex="12pt"/>
    </style:style>
    <style:style style:name="P11" style:family="paragraph" style:parent-style-name="Heading_20_4">
      <style:text-properties fo:font-size="10pt" officeooo:paragraph-rsid="001e6610" style:font-size-asian="10pt" style:font-size-complex="10pt"/>
    </style:style>
    <style:style style:name="P12" style:family="paragraph" style:parent-style-name="Text_20_body">
      <style:text-properties fo:font-size="10pt" officeooo:paragraph-rsid="001e6610" style:font-size-asian="10pt" style:font-size-complex="10pt"/>
    </style:style>
    <style:style style:name="P13" style:family="paragraph" style:parent-style-name="Text_20_body" style:list-style-name="L1">
      <style:text-properties fo:font-size="10pt" officeooo:paragraph-rsid="001e6610" style:font-size-asian="10pt" style:font-size-complex="10pt"/>
    </style:style>
    <style:style style:name="P14" style:family="paragraph" style:parent-style-name="Text_20_body" style:list-style-name="L6">
      <style:text-properties fo:font-size="10pt" officeooo:paragraph-rsid="001e6610" style:font-size-asian="10pt" style:font-size-complex="10pt"/>
    </style:style>
    <style:style style:name="P15" style:family="paragraph" style:parent-style-name="Text_20_body" style:list-style-name="L7">
      <style:text-properties fo:font-size="10pt" officeooo:paragraph-rsid="001e6610" style:font-size-asian="10pt" style:font-size-complex="10pt"/>
    </style:style>
    <style:style style:name="P16" style:family="paragraph" style:parent-style-name="Text_20_body" style:list-style-name="L8">
      <style:text-properties fo:font-size="10pt" officeooo:paragraph-rsid="001e6610" style:font-size-asian="10pt" style:font-size-complex="10pt"/>
    </style:style>
    <style:style style:name="P17" style:family="paragraph" style:parent-style-name="Text_20_body" style:list-style-name="L9">
      <style:text-properties fo:font-size="10pt" officeooo:paragraph-rsid="001e6610" style:font-size-asian="10pt" style:font-size-complex="10pt"/>
    </style:style>
    <style:style style:name="T1"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h text:style-name="P1" text:outline-level="2">Prevención y niveles de prevención en salud</text:h>
            <text:h text:style-name="P2" text:outline-level="2">1. ¿Qué significa prevenir?</text:h>
            <text:h text:style-name="P3" text:outline-level="4">A. Pensar, comprender</text:h>
            <text:p text:style-name="P4">Piensa con tus compañeros, usando el sentido común y lo que sabes, y contesta brevemente estas preguntas:</text:p>
            <text:list xml:id="list2610688501" text:style-name="L1">
              <text:list-item>
                <text:p text:style-name="P5">Es mejor prevenir una enfermedad que tratarla, pero... ¿Siempre se puede prevenir? Dar ejemplos. Ej. Hipertensión arterial, no siempre puede prevenirse por completo, inlfuyen la edad, la genética</text:p>
              </text:list-item>
              <text:list-item>
                <text:p text:style-name="P5">Si una persona se siente perfectamente bien, ¿tiene sentido que vaya al médico? ¿En qué casos sí y en cuáles no?</text:p>
              </text:list-item>
            </text:list>
            <text:h text:style-name="P3" text:outline-level="4" text:is-list-header="true">B. Clasificación</text:h>
            <text:p text:style-name="P4">Piensa y agrupa estas acciones según el momento en que actúa:</text:p>
            <text:list text:style-name="L2">
              <text:list-item>
                <text:p text:style-name="P6"><text:span text:style-name="T1">antes</text:span> de que aparezca la enfermedad</text:p>
              </text:list-item>
              <text:list-item>
                <text:p text:style-name="P6">cuando la enfermedad <text:span text:style-name="T1">recién comienza</text:span></text:p>
              </text:list-item>
              <text:list-item>
                <text:p text:style-name="P6">cuando la enfermedad <text:span text:style-name="T1">ya produjo consecuencias</text:span></text:p>
              </text:list-item>
            </text:list>
            <text:p text:style-name="P4">Vacunación infantil - Control de la presión arterial - Rehabilitación después de un accidente cerebrovascular - Uso del cinturón de seguridad - Mamografía de control - Fisioterapia luego de una fractura - Alimentación saludable - Tratamiento para controlar la diabetes - Educación para la salud - Análisis de sangre de rutina - Uso de protector solar - Rehabilitación cardíaca.</text:p>
            <text:h text:style-name="P2" text:outline-level="2">2. Niveles de prevención</text:h>
            <text:p text:style-name="P4">Lee estos casos, convésalos en grupo, luego trata de resolverlos respondiendo las preguntas.</text:p>
            <text:h text:style-name="P3" text:outline-level="4">A. Caso: Una decisión difícil</text:h>
            <text:p text:style-name="P4">En una ciudad pequeña aumentó la cantidad de personas con diabetes. El presupuesto del sistema de salud es limitado y solo alcanza para poner en marcha <text:span text:style-name="T1">uno</text:span> de los siguientes programas durante el próximo año:</text:p>
            <text:list text:style-name="L3">
              <text:list-item>
                <text:p text:style-name="P7">Organizar charlas en las escuelas y clubes sobre alimentación saludable y actividad física.</text:p>
              </text:list-item>
              <text:list-item>
                <text:p text:style-name="P7"><text:soft-page-break/>Realizar controles gratuitos de glucemia para detectar personas con diabetes que todavía no lo saben.</text:p>
              </text:list-item>
              <text:list-item>
                <text:p text:style-name="P7">Ampliar el servicio de rehabilitación para pacientes que ya sufrieron amputaciones u otras complicaciones de la enfermedad.</text:p>
              </text:list-item>
            </text:list>
            <text:p text:style-name="P4"><text:span text:style-name="T1">Responder:</text:span></text:p>
            <text:list text:style-name="L4">
              <text:list-item>
                <text:p text:style-name="P8">¿A qué nivel de prevención corresponde cada propuesta?</text:p>
              </text:list-item>
              <text:list-item>
                <text:p text:style-name="P8">Si solo pudiera elegirse una, ¿cuál priorizarían? Justifiquen.</text:p>
              </text:list-item>
              <text:list-item>
                <text:p text:style-name="P8">¿Significa que las otras dos no son importantes? Expliquen.</text:p>
              </text:list-item>
            </text:list>
            <text:h text:style-name="P3" text:outline-level="4" text:is-list-header="true">B. Caso: La historia de Tomás</text:h>
            <text:p text:style-name="P4">Tomás tiene 16 años. Durante varios años llevó una vida sedentaria y tuvo una alimentación poco saludable. Nunca asistía a controles médicos porque decía sentirse bien.</text:p>
            <text:p text:style-name="P4">En un control realizado en la escuela, un profesional detectó que tenía la presión arterial más alta de lo normal. Después de varios estudios, comenzó un tratamiento y modificó sus hábitos.</text:p>
            <text:p text:style-name="P4">Dos años más tarde, sufrió una complicación cardiovascular que le dejó dificultades para realizar algunas actividades físicas. Desde entonces asiste a sesiones de rehabilitación y realiza controles periódicos.</text:p>
            <text:p text:style-name="P4"><text:span text:style-name="T1">Responder:</text:span></text:p>
            <text:list text:style-name="L5">
              <text:list-item>
                <text:p text:style-name="P9">Identifiquen en la historia ejemplos de prevención primaria, secundaria y terciaria.</text:p>
              </text:list-item>
              <text:list-item>
                <text:p text:style-name="P9">¿Qué acciones podrían haberse realizado antes para reducir el riesgo de llegar a esa situación?</text:p>
              </text:list-item>
              <text:list-item>
                <text:p text:style-name="P9">¿En qué momento consideran que hubo una oportunidad perdida para prevenir el problema?</text:p>
              </text:list-item>
            </text:list>
            <text:h text:style-name="P3" text:outline-level="4" text:is-list-header="true">C. Pregunta de reflexión</text:h>
            <text:p text:style-name="P4">¿Creen que invertir dinero en prevención primaria siempre reduce el gasto en prevención terciaria? ¿Por qué? ¿Se les ocurre algún caso en el que eso no ocurra? Piensa también en que hay enfermedades muy relacionadas con la edad o con un fuerte componente genético.</text:p>
            <text:p text:style-name="Text_20_body"/>
          </table:table-cell>
          <table:table-cell table:style-name="Table1.B1" office:value-type="string">
            <text:h text:style-name="P1" text:outline-level="2">Prevención y niveles de prevención en salud</text:h>
            <text:h text:style-name="P10" text:outline-level="2">1. ¿Qué significa prevenir?</text:h>
            <text:h text:style-name="P11" text:outline-level="4">A. Pensar, comprender</text:h>
            <text:p text:style-name="P12">Piensa con tus compañeros, usando el sentido común y lo que sabes, y contesta brevemente estas preguntas:</text:p>
            <text:list text:continue-list="list2610688501" text:style-name="L1">
              <text:list-item>
                <text:p text:style-name="P13">Es mejor prevenir una enfermedad que tratarla, pero... ¿Siempre se puede prevenir? Dar ejemplos. Ej. Hipertensión arterial, no siempre puede prevenirse por completo, inlfuyen la edad, la genética</text:p>
              </text:list-item>
              <text:list-item>
                <text:p text:style-name="P13">Si una persona se siente perfectamente bien, ¿tiene sentido que vaya al médico? ¿En qué casos sí y en cuáles no?</text:p>
              </text:list-item>
            </text:list>
            <text:h text:style-name="P11" text:outline-level="4" text:is-list-header="true">B. Clasificación</text:h>
            <text:p text:style-name="P12">Piensa y agrupa estas acciones según el momento en que actúa:</text:p>
            <text:list text:style-name="L6">
              <text:list-item>
                <text:p text:style-name="P14"><text:span text:style-name="T1">antes</text:span> de que aparezca la enfermedad</text:p>
              </text:list-item>
              <text:list-item>
                <text:p text:style-name="P14">cuando la enfermedad <text:span text:style-name="T1">recién comienza</text:span></text:p>
              </text:list-item>
              <text:list-item>
                <text:p text:style-name="P14">cuando la enfermedad <text:span text:style-name="T1">ya produjo consecuencias</text:span></text:p>
              </text:list-item>
            </text:list>
            <text:p text:style-name="P12">Vacunación infantil - Control de la presión arterial - Rehabilitación después de un accidente cerebrovascular - Uso del cinturón de seguridad - Mamografía de control - Fisioterapia luego de una fractura - Alimentación saludable - Tratamiento para controlar la diabetes - Educación para la salud - Análisis de sangre de rutina - Uso de protector solar - Rehabilitación cardíaca.</text:p>
            <text:h text:style-name="P10" text:outline-level="2">2. Niveles de prevención</text:h>
            <text:p text:style-name="P12">Lee estos casos, convésalos en grupo, luego trata de resolverlos respondiendo las preguntas.</text:p>
            <text:h text:style-name="P11" text:outline-level="4">A. Caso: Una decisión difícil</text:h>
            <text:p text:style-name="P12">En una ciudad pequeña aumentó la cantidad de personas con diabetes. El presupuesto del sistema de salud es limitado y solo alcanza para poner en marcha <text:span text:style-name="T1">uno</text:span> de los siguientes programas durante el próximo año:</text:p>
            <text:list text:style-name="L7">
              <text:list-item>
                <text:p text:style-name="P15">Organizar charlas en las escuelas y clubes sobre alimentación saludable y actividad física.</text:p>
              </text:list-item>
              <text:list-item>
                <text:p text:style-name="P15"><text:soft-page-break/>Realizar controles gratuitos de glucemia para detectar personas con diabetes que todavía no lo saben.</text:p>
              </text:list-item>
              <text:list-item>
                <text:p text:style-name="P15">Ampliar el servicio de rehabilitación para pacientes que ya sufrieron amputaciones u otras complicaciones de la enfermedad.</text:p>
              </text:list-item>
            </text:list>
            <text:p text:style-name="P12"><text:span text:style-name="T1">Responder:</text:span></text:p>
            <text:list text:style-name="L8">
              <text:list-item>
                <text:p text:style-name="P16">¿A qué nivel de prevención corresponde cada propuesta?</text:p>
              </text:list-item>
              <text:list-item>
                <text:p text:style-name="P16">Si solo pudiera elegirse una, ¿cuál priorizarían? Justifiquen.</text:p>
              </text:list-item>
              <text:list-item>
                <text:p text:style-name="P16">¿Significa que las otras dos no son importantes? Expliquen.</text:p>
              </text:list-item>
            </text:list>
            <text:h text:style-name="P11" text:outline-level="4" text:is-list-header="true">B. Caso: La historia de Tomás</text:h>
            <text:p text:style-name="P12">Tomás tiene 16 años. Durante varios años llevó una vida sedentaria y tuvo una alimentación poco saludable. Nunca asistía a controles médicos porque decía sentirse bien.</text:p>
            <text:p text:style-name="P12">En un control realizado en la escuela, un profesional detectó que tenía la presión arterial más alta de lo normal. Después de varios estudios, comenzó un tratamiento y modificó sus hábitos.</text:p>
            <text:p text:style-name="P12">Dos años más tarde, sufrió una complicación cardiovascular que le dejó dificultades para realizar algunas actividades físicas. Desde entonces asiste a sesiones de rehabilitación y realiza controles periódicos.</text:p>
            <text:p text:style-name="P12"><text:span text:style-name="T1">Responder:</text:span></text:p>
            <text:list text:style-name="L9">
              <text:list-item>
                <text:p text:style-name="P17">Identifiquen en la historia ejemplos de prevención primaria, secundaria y terciaria.</text:p>
              </text:list-item>
              <text:list-item>
                <text:p text:style-name="P17">¿Qué acciones podrían haberse realizado antes para reducir el riesgo de llegar a esa situación?</text:p>
              </text:list-item>
              <text:list-item>
                <text:p text:style-name="P17">¿En qué momento consideran que hubo una oportunidad perdida para prevenir el problema?</text:p>
              </text:list-item>
            </text:list>
            <text:h text:style-name="P11" text:outline-level="4" text:is-list-header="true">C. Pregunta de reflexión</text:h>
            <text:p text:style-name="P12">¿Creen que invertir dinero en prevención primaria siempre reduce el gasto en prevención terciaria? ¿Por qué? ¿Se les ocurre algún caso en el que eso no ocurra? Piensa también en que hay enfermedades muy relacionadas con la edad o con un fuerte componente genético.</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199cm" fo:margin-bottom="1.199cm" fo:margin-left="1.199cm" fo:margin-right="1.1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7-07T06:21:28.678172200</meta:creation-date>
    <dc:date>2026-07-07T06:47:08.473050100</dc:date>
    <meta:editing-duration>PT12M2S</meta:editing-duration>
    <meta:editing-cycles>2</meta:editing-cycles>
    <meta:generator>LibreOffice/26.2.1.2$Windows_X86_64 LibreOffice_project/620$Build-2</meta:generator>
    <meta:print-date>2026-07-07T06:42:15.027217900</meta:print-date>
    <meta:document-statistic meta:table-count="1" meta:image-count="0" meta:object-count="0" meta:page-count="2" meta:paragraph-count="66" meta:word-count="980" meta:character-count="6210" meta:non-whitespace-character-count="5324"/>
  </office:meta>
</office:document-meta>
</file>